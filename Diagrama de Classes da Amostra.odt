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7.497cm" table:align="left"/>
    </style:style>
    <style:style style:name="Tabela1.A" style:family="table-column">
      <style:table-column-properties style:column-width="7.497cm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5.8cm" table:align="left"/>
    </style:style>
    <style:style style:name="Tabela2.A" style:family="table-column">
      <style:table-column-properties style:column-width="5.8cm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0.5pt solid #000000" fo:border-top="none" fo:border-bottom="0.5pt solid #000000"/>
    </style:style>
    <style:style style:name="Tabela2.3" style:family="table-row">
      <style:table-row-properties style:min-row-height="0.778cm"/>
    </style:style>
    <style:style style:name="Tabela3" style:family="table">
      <style:table-properties style:width="5.292cm" table:align="left"/>
    </style:style>
    <style:style style:name="Tabela3.A" style:family="table-column">
      <style:table-column-properties style:column-width="5.292cm"/>
    </style:style>
    <style:style style:name="Tabela3.A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5.38cm" table:align="left"/>
    </style:style>
    <style:style style:name="Tabela4.A" style:family="table-column">
      <style:table-column-properties style:column-width="5.38cm"/>
    </style:style>
    <style:style style:name="Tabela4.A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5.38cm" table:align="left"/>
    </style:style>
    <style:style style:name="Tabela5.A" style:family="table-column">
      <style:table-column-properties style:column-width="5.38cm"/>
    </style:style>
    <style:style style:name="Tabela5.A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style:font-name="Arial1"/>
    </style:style>
    <style:style style:name="P2" style:family="paragraph" style:parent-style-name="Standard">
      <style:paragraph-properties fo:text-align="end" style:justify-single-word="false"/>
      <style:text-properties style:font-name="Arial1" officeooo:paragraph-rsid="000b1781"/>
    </style:style>
    <style:style style:name="P3" style:family="paragraph" style:parent-style-name="Standard">
      <style:paragraph-properties fo:text-align="justify" style:justify-single-word="false"/>
      <style:text-properties style:font-name="Arial1" officeooo:paragraph-rsid="000b1781"/>
    </style:style>
    <style:style style:name="P4" style:family="paragraph" style:parent-style-name="Standard">
      <style:paragraph-properties fo:text-align="center" style:justify-single-word="false"/>
      <style:text-properties style:font-name="Arial1" officeooo:paragraph-rsid="000b1781"/>
    </style:style>
    <style:style style:name="P5" style:family="paragraph" style:parent-style-name="Table_20_Contents">
      <style:paragraph-properties fo:text-align="center" style:justify-single-word="false"/>
      <style:text-properties style:font-name="Arial1"/>
    </style:style>
    <style:style style:name="P6" style:family="paragraph" style:parent-style-name="Standard">
      <style:paragraph-properties fo:text-align="justify" style:justify-single-word="false"/>
      <style:text-properties style:font-name="Arial1" officeooo:paragraph-rsid="000b7375"/>
    </style:style>
    <style:style style:name="P7" style:family="paragraph" style:parent-style-name="Table_20_Contents">
      <style:paragraph-properties fo:text-align="justify" style:justify-single-word="false"/>
      <style:text-properties style:font-name="Arial1"/>
    </style:style>
    <style:style style:name="P8" style:family="paragraph" style:parent-style-name="Standard">
      <style:paragraph-properties fo:text-align="center" style:justify-single-word="false"/>
      <style:text-properties style:font-name="Arial1" officeooo:paragraph-rsid="000b7375"/>
    </style:style>
    <style:style style:name="T1" style:family="text">
      <style:text-properties officeooo:rsid="000b1781"/>
    </style:style>
    <style:style style:name="T2" style:family="text">
      <style:text-properties officeooo:rsid="000b73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Jogo <text:s text:c="16"/><text:span text:style-name="T1"><text:s text:c="13"/></text:span><text:s text:c="2"/></text:p>
          </table:table-cell>
        </table:table-row>
        <table:table-row>
          <table:table-cell table:style-name="Tabela1.A2" office:value-type="string">
            <text:p text:style-name="P3">- moedas : int <text:s text:c="34"/></text:p>
            <text:p text:style-name="P3">- energia : int <text:s text:c="33"/></text:p>
            <text:p text:style-name="P3">- energiaMaxima : int <text:s text:c="27"/></text:p>
            <text:p text:style-name="P3">- agua : int <text:s text:c="36"/></text:p>
            <text:p text:style-name="P3">- poluicao : int <text:s text:c="32"/></text:p>
            <text:p text:style-name="P3">- restauracao : int <text:s text:c="29"/></text:p>
            <text:p text:style-name="P3">- dia : int <text:s text:c="37"/></text:p>
            <text:p text:style-name="P3">- nivel : int <text:s text:c="35"/></text:p>
            <text:p text:style-name="P3">- energiaSolar : int <text:s text:c="28"/></text:p>
            <text:p text:style-name="P3">- morangosPlantados : int <text:s text:c="23"/></text:p>
            <text:p text:style-name="P3">- inventario : Inventario <text:s text:c="23"/></text:p>
            <text:p text:style-name="P3">- animais : Animal <text:s text:c="30"/></text:p>
            <text:p text:style-name="P3">- plantacoes : List&lt;Plantacao&gt; <text:s text:c="18"/></text:p>
            <text:p text:style-name="P3">- missoes : List&lt;Missao&gt; <text:s text:c="7"/></text:p>
          </table:table-cell>
        </table:table-row>
        <table:table-row>
          <table:table-cell table:style-name="Tabela1.A2" office:value-type="string">
            <text:p text:style-name="P3"><text:span text:style-name="T2"><text:s/></text:span>+ plantarMorango() <text:s text:c="30"/></text:p>
            <text:p text:style-name="P3"><text:s/>+ plantarBanana() <text:s text:c="31"/></text:p>
            <text:p text:style-name="P3"><text:s/>+ colher() <text:s text:c="38"/></text:p>
            <text:p text:style-name="P3"><text:s/>+ venderMorango() <text:s text:c="31"/></text:p>
            <text:p text:style-name="P3"><text:s/>+ venderBanana() <text:s text:c="32"/></text:p>
            <text:p text:style-name="P3"><text:s/>+ venderOvos() <text:s text:c="34"/></text:p>
            <text:p text:style-name="P3"><text:s/>+ venderLeite() <text:s text:c="33"/></text:p>
            <text:p text:style-name="P3"><text:s/>+ comprarGalinha() <text:s text:c="30"/></text:p>
            <text:p text:style-name="P3"><text:s/>+ comprarVaca() <text:s text:c="33"/></text:p>
            <text:p text:style-name="P3"><text:s/>+ produzirAnimais() <text:s text:c="29"/></text:p>
            <text:p text:style-name="P3"><text:s/>+ construirPainelSolar() <text:s text:c="24"/></text:p>
            <text:p text:style-name="P3"><text:s/>+ limparArea() <text:s text:c="34"/></text:p>
            <text:p text:style-name="P3"><text:s/>+ proximoDia() <text:s text:c="34"/></text:p>
            <text:p text:style-name="P3"><text:s/>+ verificarNivel() <text:s text:c="30"/></text:p>
            <text:p text:style-name="P3"><text:s/>+ verificarMissoes() <text:s text:c="28"/></text:p>
            <text:p text:style-name="P3"><text:s/>+ verificarVitoria() <text:s text:c="28"/></text:p>
            <text:p text:style-name="P3"><text:s/>+ verificarPoluicao() <text:s text:c="27"/></text:p>
            <text:p text:style-name="P3"><text:s/>+ salvarJogo() <text:s text:c="34"/></text:p>
            <text:p text:style-name="P3"><text:s/>+ carregarJogo() <text:s text:c="5"/></text:p>
          </table:table-cell>
        </table:table-row>
      </table:table>
      <text:p text:style-name="P1"/>
      <text:p text:style-name="P1"/>
      <text:p text:style-name="P1"/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"><text:s text:c="5"/>Plantacao <text:s text:c="3"/></text:p>
          </table:table-cell>
        </table:table-row>
        <table:table-row>
          <table:table-cell table:style-name="Tabela2.A2" office:value-type="string">
            <text:p text:style-name="P3">- nome : String <text:s text:c="17"/></text:p>
            <text:p text:style-name="P3">- preco : int <text:s text:c="19"/></text:p>
            <text:p text:style-name="P3">- venda : int <text:s text:c="19"/></text:p>
            <text:p text:style-name="P3">- dias : int <text:s text:c="20"/></text:p>
            <text:p text:style-name="P3">- crescimento : int <text:s text:c="13"/></text:p>
            <text:p text:style-name="P3">- pronta : boolean <text:s text:c="4"/></text:p>
          </table:table-cell>
        </table:table-row>
        <table:table-row table:style-name="Tabela2.3">
          <table:table-cell table:style-name="Tabela2.A2" office:value-type="string">
            <text:p text:style-name="P3">+ crescer()</text:p>
            <text:p text:style-name="P3">+colher() <text:line-break/>+verificarPronta() </text:p>
          </table:table-cell>
        </table:table-row>
      </table:table>
      <text:p text:style-name="P1"/>
      <text:p text:style-name="P1"><text:soft-page-break/><text:s text:c="16"/></text:p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Inventario </text:p>
          </table:table-cell>
        </table:table-row>
        <table:table-row>
          <table:table-cell table:style-name="Tabela3.A2" office:value-type="string">
            <text:p text:style-name="P6">- morango : int <text:s text:c="15"/></text:p>
            <text:p text:style-name="P6">- banana : int <text:s text:c="18"/></text:p>
            <text:p text:style-name="P6">- ovos : int <text:s text:c="20"/></text:p>
            <text:p text:style-name="P6">- leite : int <text:s/></text:p>
          </table:table-cell>
        </table:table-row>
        <table:table-row>
          <table:table-cell table:style-name="Tabela3.A2" office:value-type="string">
            <text:p text:style-name="P7">+adicionarItem()<text:line-break/>+removerItem() <text:line-break/>+ verificarQuantidade() </text:p>
          </table:table-cell>
        </table:table-row>
      </table:table>
      <text:p text:style-name="P1"/>
      <text:p text:style-name="P1"/>
      <text:p text:style-name="P1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"><text:s text:c="9"/>Animal <text:s text:c="6"/></text:p>
          </table:table-cell>
        </table:table-row>
        <table:table-row>
          <table:table-cell table:style-name="Tabela4.A2" office:value-type="string">
            <text:p text:style-name="P7">-galinhas:int <text:line-break/>- vacas : int </text:p>
          </table:table-cell>
        </table:table-row>
        <table:table-row>
          <table:table-cell table:style-name="Tabela4.A2" office:value-type="string">
            <text:p text:style-name="P7">+produzirOvos() <text:line-break/>+produzirLeite() <text:line-break/><text:span text:style-name="T2">+</text:span>adicionarAnimal() </text:p>
          </table:table-cell>
        </table:table-row>
      </table:table>
      <text:p text:style-name="P1"/>
      <text:p text:style-name="P1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5">Missao </text:p>
          </table:table-cell>
        </table:table-row>
        <table:table-row>
          <table:table-cell table:style-name="Tabela5.A2" office:value-type="string">
            <text:p text:style-name="P7">-id:int <text:line-break/>-nome:String <text:line-break/>-concluida : boolean </text:p>
          </table:table-cell>
        </table:table-row>
        <table:table-row>
          <table:table-cell table:style-name="Tabela5.A2" office:value-type="string">
            <text:p text:style-name="P7">+verificarConclusao() <text:line-break/>+concluirMissao() <text:line-break/>+ exibirMissao()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8T14:28:29.873737700</meta:creation-date>
    <dc:date>2026-05-28T14:51:32.356934500</dc:date>
    <meta:editing-duration>PT8M10S</meta:editing-duration>
    <meta:editing-cycles>1</meta:editing-cycles>
    <meta:document-statistic meta:table-count="5" meta:image-count="0" meta:object-count="0" meta:page-count="2" meta:paragraph-count="56" meta:word-count="164" meta:character-count="2286" meta:non-whitespace-character-count="922"/>
    <meta:generator>LibreOffice/25.8.6.2$Windows_X86_64 LibreOffice_project/b4b39682cd9868fa725bc664aff94278d315bd04</meta:generator>
  </office:meta>
</office:document-meta>
</file>